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A0000082020F49BA0.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2" style:family="paragraph">
      <loext:graphic-properties draw:fill="gradient" draw:fill-color="#ccc5b3" draw:fill-gradient-name="Gradient_20_2" draw:gradient-step-count="0"/>
    </style:style>
    <style:style style:name="P3" style:family="paragraph" style:parent-style-name="Title">
      <style:paragraph-properties fo:line-height="100%"/>
      <style:text-properties officeooo:paragraph-rsid="00d0f1a6"/>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a5ecc8"/>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montserrat" fo:font-size="18pt" fo:font-weight="bold" officeooo:paragraph-rsid="00c4b30d" style:font-size-asian="18pt" style:font-weight-asian="bold" style:font-size-complex="18pt" style:font-weight-complex="bold"/>
    </style:style>
    <style:style style:name="P1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defecf"/>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c4b30d"/>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c4b30d"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cef6b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c4b30d"/>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c4b30d"/>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c4b30d"/>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c4b30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d133b0"/>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d133b0" style:font-size-asian="7pt" style:font-size-complex="8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d133b0"/>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c4b30d"/>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8" style:family="paragraph" style:parent-style-name="Heading_20_1">
      <style:paragraph-properties fo:margin-top="0in" fo:margin-bottom="0in" style:contextual-spacing="false" fo:line-height="100%" fo:text-align="center" style:justify-single-word="fals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54e19" officeooo:paragraph-rsid="00b54e19"/>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54e19"/>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6878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rsid="00d28f46" officeooo:paragraph-rsid="00defecf"/>
    </style:style>
    <style:style style:name="P34" style:family="paragraph" style:parent-style-name="Heading_20_2">
      <style:paragraph-properties fo:margin-top="0in" fo:margin-bottom="0in" style:contextual-spacing="false" fo:line-height="100%" fo:text-align="center" style:justify-single-word="false" fo:break-before="page"/>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officeooo:paragraph-rsid="0015c0cb"/>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68781" style:font-size-asian="14pt" style:font-size-complex="14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68781"/>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size="22pt" officeooo:paragraph-rsid="00b68781" style:font-size-asian="22pt" style:font-size-complex="22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f8f98"/>
    </style:style>
    <style:style style:name="P46" style:family="paragraph" style:parent-style-name="Heading_20_1">
      <style:paragraph-properties fo:margin-top="0in" fo:margin-bottom="0in" style:contextual-spacing="false" fo:text-align="center" style:justify-single-word="false" fo:break-before="page"/>
      <style:text-properties style:font-name="Nimbus Mono PS" fo:font-size="14pt" officeooo:rsid="00e07839" officeooo:paragraph-rsid="00e07839" style:font-size-asian="14pt" style:font-size-complex="14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07839"/>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83a38"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206f"/>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83a38" style:font-size-asian="7pt" style:font-size-complex="8pt"/>
    </style:style>
    <style:style style:name="P5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53" style:family="paragraph">
      <style:paragraph-properties fo:text-align="center"/>
    </style:style>
    <style:style style:name="P54" style:family="paragraph">
      <loext:graphic-properties draw:fill-color="#000000"/>
      <style:paragraph-properties fo:text-align="center"/>
    </style:style>
    <style:style style:name="P55" style:family="paragraph">
      <loext:graphic-properties draw:fill-color="#ffffff"/>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71af"/>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e07839" officeooo:paragraph-rsid="00e0c6fe"/>
    </style:style>
    <style:style style:name="P60" style:family="paragraph" style:parent-style-name="Text_20_body">
      <loext:graphic-properties draw:fill-gradient-name="gradient" draw:fill-hatch-name="hatch"/>
      <style:paragraph-properties fo:margin-top="0in" fo:margin-bottom="0in" style:contextual-spacing="false" fo:line-height="100%" fo:break-before="page">
        <style:tab-stops/>
      </style:paragraph-properties>
      <style:text-properties style:font-name="Nimbus Mono PS" officeooo:paragraph-rsid="007d4c9a"/>
    </style:style>
    <style:style style:name="P6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62"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6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6" style:family="paragraph" style:parent-style-name="Table_20_Contents">
      <style:paragraph-properties fo:text-align="center" style:justify-single-word="false"/>
      <style:text-properties style:font-name="Nimbus Mono PS" officeooo:rsid="007d4c9a" officeooo:paragraph-rsid="007d4c9a"/>
    </style:style>
    <style:style style:name="P67" style:family="paragraph" style:parent-style-name="Table_20_Contents">
      <style:paragraph-properties fo:text-align="start" style:justify-single-word="false"/>
      <style:text-properties style:font-name="Nimbus Mono PS" officeooo:rsid="007d4c9a" officeooo:paragraph-rsid="007d4c9a"/>
    </style:style>
    <style:style style:name="P68" style:family="paragraph" style:parent-style-name="Table_20_Contents">
      <style:paragraph-properties fo:text-align="center" style:justify-single-word="false"/>
      <style:text-properties style:font-name="Nimbus Mono PS" officeooo:rsid="00bb79bc" officeooo:paragraph-rsid="00bb79bc"/>
    </style:style>
    <style:style style:name="P69" style:family="paragraph" style:parent-style-name="Table_20_Contents">
      <style:paragraph-properties fo:text-align="start" style:justify-single-word="false"/>
      <style:text-properties style:font-name="Nimbus Mono PS" officeooo:rsid="00bb79bc" officeooo:paragraph-rsid="00bb79bc"/>
    </style:style>
    <style:style style:name="P7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7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9pt" officeooo:rsid="007d4c9a" officeooo:paragraph-rsid="007d4c9a" style:font-size-asian="29pt" style:font-size-complex="29pt"/>
    </style:style>
    <style:style style:name="P72"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73"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4" style:family="paragraph" style:parent-style-name="Heading_20_2">
      <style:paragraph-properties fo:margin-top="0in" fo:margin-bottom="0in" style:contextual-spacing="false" fo:line-height="100%"/>
      <style:text-properties style:font-name="Montserrat" fo:font-size="14pt" officeooo:rsid="00b83a38" officeooo:paragraph-rsid="00b83a38" style:font-size-asian="14pt" style:font-size-complex="14pt"/>
    </style:style>
    <style:style style:name="P75" style:family="paragraph" style:parent-style-name="Standard">
      <style:text-properties style:font-name="Montserrat" officeooo:paragraph-rsid="00c4c858"/>
    </style:style>
    <style:style style:name="P76" style:family="paragraph" style:parent-style-name="Standard">
      <style:text-properties style:font-name="Montserrat" fo:font-size="12pt" fo:font-weight="normal" officeooo:rsid="00bb79bc" officeooo:paragraph-rsid="00c00f09"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bb79bc" officeooo:paragraph-rsid="00c4c858"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c00f09" officeooo:paragraph-rsid="00c4c858"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c4a672" officeooo:paragraph-rsid="00c4c858" style:font-size-asian="10.5pt" style:font-weight-asian="normal" style:font-size-complex="12pt" style:font-weight-complex="normal"/>
    </style:style>
    <style:style style:name="P80" style:family="paragraph" style:parent-style-name="Text_20_body">
      <style:paragraph-properties fo:line-height="100%" fo:break-before="page"/>
      <style:text-properties style:font-name="Montserrat1" officeooo:paragraph-rsid="00a5ecc8"/>
    </style:style>
    <style:style style:name="P81" style:family="paragraph" style:parent-style-name="Text_20_body">
      <style:paragraph-properties fo:line-height="100%"/>
      <style:text-properties style:font-name="Montserrat1" officeooo:paragraph-rsid="00a5ecc8"/>
    </style:style>
    <style:style style:name="P82" style:family="paragraph">
      <loext:graphic-properties draw:fill="gradient" draw:fill-color="#ccc5b3" draw:fill-gradient-name="Gradient_20_2" draw:gradient-step-count="0"/>
      <style:paragraph-properties style:writing-mode="lr-tb"/>
    </style:style>
    <style:style style:name="P83" style:family="paragraph" style:parent-style-name="Text_20_body">
      <style:paragraph-properties fo:line-height="100%" fo:text-align="center" style:justify-single-word="false"/>
      <style:text-properties style:font-name="Montserrat1" fo:font-weight="bold" officeooo:paragraph-rsid="00d0f1a6"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fo:font-size="16pt" style:font-size-asian="14pt" style:font-size-complex="16pt"/>
    </style:style>
    <style:style style:name="T6" style:family="text">
      <style:text-properties officeooo:rsid="0023596c"/>
    </style:style>
    <style:style style:name="T7" style:family="text">
      <style:text-properties style:font-name="Montserrat" officeooo:rsid="00b54e19"/>
    </style:style>
    <style:style style:name="T8" style:family="text">
      <style:text-properties style:font-name="Montserrat" officeooo:rsid="00dcd367"/>
    </style:style>
    <style:style style:name="T9" style:family="text">
      <style:text-properties style:font-name="Nimbus Mono PS"/>
    </style:style>
    <style:style style:name="T10" style:family="text">
      <style:text-properties style:font-name="Nimbus Mono PS" officeooo:rsid="00d1340f"/>
    </style:style>
    <style:style style:name="T11" style:family="text">
      <style:text-properties style:font-name="Nimbus Mono PS" officeooo:rsid="00b54e19"/>
    </style:style>
    <style:style style:name="T12" style:family="text">
      <style:text-properties style:font-name="Nimbus Mono PS" officeooo:rsid="00dcd367"/>
    </style:style>
    <style:style style:name="T13" style:family="text">
      <style:text-properties style:font-name="Nimbus Mono PS" officeooo:rsid="00dd3720"/>
    </style:style>
    <style:style style:name="T14" style:family="text">
      <style:text-properties style:font-name="Nimbus Mono PS" officeooo:rsid="00de34f5"/>
    </style:style>
    <style:style style:name="T15" style:family="text">
      <style:text-properties officeooo:rsid="009b0460"/>
    </style:style>
    <style:style style:name="T16" style:family="text">
      <style:text-properties fo:font-style="italic" officeooo:rsid="009b0460" style:font-style-asian="italic" style:font-style-complex="italic"/>
    </style:style>
    <style:style style:name="T17" style:family="text">
      <style:text-properties officeooo:rsid="00622ad5"/>
    </style:style>
    <style:style style:name="T18" style:family="text">
      <style:text-properties officeooo:rsid="00b0307a"/>
    </style:style>
    <style:style style:name="T19" style:family="text">
      <style:text-properties fo:font-style="italic" officeooo:rsid="00622ad5" style:font-style-asian="italic" style:font-style-complex="italic"/>
    </style:style>
    <style:style style:name="T20" style:family="text">
      <style:text-properties officeooo:rsid="0079151b"/>
    </style:style>
    <style:style style:name="T21" style:family="text">
      <style:text-properties officeooo:rsid="00d2665f"/>
    </style:style>
    <style:style style:name="T22" style:family="text">
      <style:text-properties officeooo:rsid="00d4206f"/>
    </style:style>
    <style:style style:name="T23" style:family="text">
      <style:text-properties officeooo:rsid="00de34f5"/>
    </style:style>
    <style:style style:name="T24" style:family="text">
      <style:text-properties officeooo:rsid="0099fc9f"/>
    </style:style>
    <style:style style:name="T25" style:family="text">
      <style:text-properties officeooo:rsid="0071d5b5"/>
    </style:style>
    <style:style style:name="T26" style:family="text">
      <style:text-properties officeooo:rsid="00839d42"/>
    </style:style>
    <style:style style:name="T27" style:family="text">
      <style:text-properties officeooo:rsid="00841997"/>
    </style:style>
    <style:style style:name="T28" style:family="text">
      <style:text-properties fo:font-style="italic" style:font-style-asian="italic" style:font-style-complex="italic"/>
    </style:style>
    <style:style style:name="T29" style:family="text">
      <style:text-properties style:font-name="montserrat"/>
    </style:style>
    <style:style style:name="T30" style:family="text">
      <style:text-properties fo:color="#000000" loext:opacity="100%" style:font-name="montserrat"/>
    </style:style>
    <style:style style:name="T31" style:family="text">
      <style:text-properties style:font-name="montserrat" officeooo:rsid="0044b346"/>
    </style:style>
    <style:style style:name="T32" style:family="text">
      <style:text-properties style:font-name="montserrat" officeooo:rsid="00622ad5"/>
    </style:style>
    <style:style style:name="T33" style:family="text">
      <style:text-properties fo:color="#000000" loext:opacity="100%" style:font-name="montserrat" officeooo:rsid="00622ad5"/>
    </style:style>
    <style:style style:name="T34" style:family="text">
      <style:text-properties fo:color="#000000" loext:opacity="100%" style:font-name="montserrat" officeooo:rsid="007784e1"/>
    </style:style>
    <style:style style:name="T35" style:family="text">
      <style:text-properties fo:color="#000000" loext:opacity="100%" style:font-name="montserrat" officeooo:rsid="0099fc9f"/>
    </style:style>
    <style:style style:name="T36" style:family="text">
      <style:text-properties fo:color="#000000" loext:opacity="100%" style:font-name="montserrat" officeooo:rsid="00e5d3a5"/>
    </style:style>
    <style:style style:name="T37" style:family="text">
      <style:text-properties fo:color="#000000" loext:opacity="100%" style:font-name="montserrat" fo:font-style="italic" officeooo:rsid="00e5d3a5" style:font-style-asian="italic" style:font-style-complex="italic"/>
    </style:style>
    <style:style style:name="T38" style:family="text">
      <style:text-properties fo:color="#000000" loext:opacity="100%" style:font-name="montserrat" officeooo:rsid="00a04f3c"/>
    </style:style>
    <style:style style:name="T39" style:family="text">
      <style:text-properties fo:color="#000000" loext:opacity="100%" style:font-name="montserrat" officeooo:rsid="00d133b0"/>
    </style:style>
    <style:style style:name="T40" style:family="text">
      <style:text-properties style:font-name="Nimbus Mono PS" fo:font-size="16pt" fo:font-weight="bold" officeooo:rsid="006932b8" style:font-size-asian="16pt" style:font-weight-asian="bold" style:font-size-complex="16pt" style:font-weight-complex="bold"/>
    </style:style>
    <style:style style:name="T41" style:family="text">
      <style:text-properties style:font-name="Nimbus Mono PS" officeooo:rsid="00defecf"/>
    </style:style>
    <style:style style:name="T42" style:family="text">
      <style:text-properties style:font-name="Nimbus Mono PS" officeooo:rsid="00d2665f"/>
    </style:style>
    <style:style style:name="T43" style:family="text">
      <style:text-properties style:font-name="Nimbus Mono PS" officeooo:rsid="00d28f46"/>
    </style:style>
    <style:style style:name="T44" style:family="text">
      <style:text-properties style:font-name="Nimbus Mono PS" officeooo:rsid="00b68781"/>
    </style:style>
    <style:style style:name="T45" style:family="text">
      <style:text-properties style:font-name="Nimbus Mono PS" fo:font-size="14pt" officeooo:rsid="0015c0cb" style:font-size-asian="14pt" style:font-size-complex="14pt"/>
    </style:style>
    <style:style style:name="T46" style:family="text">
      <style:text-properties officeooo:rsid="00e071d1"/>
    </style:style>
    <style:style style:name="T47" style:family="text">
      <style:text-properties officeooo:rsid="0015c0cb"/>
    </style:style>
    <style:style style:name="T48" style:family="text">
      <style:text-properties officeooo:rsid="00b68781"/>
    </style:style>
    <style:style style:name="T49" style:family="text">
      <style:text-properties style:font-name="Nimbus Mono PS" officeooo:rsid="0015c0cb"/>
    </style:style>
    <style:style style:name="T50" style:family="text">
      <style:text-properties style:font-name="Nimbus Mono PS" officeooo:rsid="00d4206f"/>
    </style:style>
    <style:style style:name="T51" style:family="text">
      <style:text-properties fo:font-size="8pt" style:font-size-asian="8pt" style:font-size-complex="8pt"/>
    </style:style>
    <style:style style:name="T52" style:family="text">
      <style:text-properties officeooo:rsid="00b54e19"/>
    </style:style>
    <style:style style:name="T53" style:family="text">
      <style:text-properties officeooo:rsid="00b83a38"/>
    </style:style>
    <style:style style:name="T54" style:family="text">
      <style:text-properties officeooo:rsid="00e07839"/>
    </style:style>
    <style:style style:name="T55" style:family="text">
      <style:text-properties officeooo:rsid="00e0c6fe"/>
    </style:style>
    <style:style style:name="T56" style:family="text">
      <style:text-properties officeooo:rsid="001f2915"/>
    </style:style>
    <style:style style:name="T57" style:family="text">
      <style:text-properties officeooo:rsid="002207d5"/>
    </style:style>
    <style:style style:name="T58" style:family="text">
      <style:text-properties officeooo:rsid="00e1bb83"/>
    </style:style>
    <style:style style:name="T59" style:family="text">
      <style:text-properties officeooo:rsid="0034479b"/>
    </style:style>
    <style:style style:name="T60" style:family="text">
      <style:text-properties officeooo:rsid="00c80950"/>
    </style:style>
    <style:style style:name="T61" style:family="text">
      <style:text-properties officeooo:rsid="00ca090e"/>
    </style:style>
    <style:style style:name="T62" style:family="text">
      <style:text-properties officeooo:rsid="00cba831"/>
    </style:style>
    <style:style style:name="T63" style:family="text">
      <style:text-properties officeooo:rsid="00b965cd"/>
    </style:style>
    <style:style style:name="T64" style:family="text">
      <style:text-properties officeooo:rsid="00d471af"/>
    </style:style>
    <style:style style:name="T65" style:family="text">
      <style:text-properties officeooo:rsid="00e63160"/>
    </style:style>
    <style:style style:name="T66" style:family="text">
      <style:text-properties officeooo:rsid="00e2ea09"/>
    </style:style>
    <style:style style:name="T67" style:family="text">
      <style:text-properties officeooo:rsid="00e4dae1"/>
    </style:style>
    <style:style style:name="T68" style:family="text">
      <style:text-properties officeooo:rsid="00e712e5"/>
    </style:style>
    <style:style style:name="T69" style:family="text">
      <style:text-properties officeooo:rsid="00e8c865"/>
    </style:style>
    <style:style style:name="T70" style:family="text">
      <style:text-properties officeooo:rsid="008140b2"/>
    </style:style>
    <style:style style:name="T71" style:family="text">
      <style:text-properties officeooo:rsid="007f39fe"/>
    </style:style>
    <style:style style:name="T72" style:family="text">
      <style:text-properties officeooo:rsid="00a5ecc8"/>
    </style:style>
    <style:style style:name="T73" style:family="text">
      <style:text-properties officeooo:rsid="00c00f09"/>
    </style:style>
    <style:style style:name="T74" style:family="text">
      <style:text-properties fo:font-size="12pt" fo:font-weight="normal" officeooo:rsid="00b83a38" style:font-size-asian="10.5pt" style:font-weight-asian="normal" style:font-size-complex="12pt" style:font-weight-complex="normal"/>
    </style:style>
    <style:style style:name="T75" style:family="text">
      <style:text-properties fo:font-size="12pt" fo:font-weight="normal" officeooo:rsid="00e0c6fe" style:font-size-asian="10.5pt" style:font-weight-asian="normal" style:font-size-complex="12pt" style:font-weight-complex="normal"/>
    </style:style>
    <style:style style:name="T76" style:family="text">
      <style:text-properties fo:color="#ffffff" loext:opacity="100%" fo:font-size="54pt" style:font-size-asian="54pt" style:font-size-complex="54pt"/>
    </style:style>
    <style:style style:name="T77" style:family="text">
      <style:text-properties fo:color="#ffffff" loext:opacity="100%" fo:font-size="50pt" officeooo:rsid="00fd1ea6" style:font-size-asian="50pt" style:font-size-complex="50pt"/>
    </style:style>
    <style:style style:name="T78" style:family="text">
      <style:text-properties fo:color="#ffffff" loext:opacity="100%" fo:font-size="50pt" style:font-size-asian="50pt" style:font-size-complex="50pt"/>
    </style:style>
    <style:style style:name="T79"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3" draw:style-name="gr1" draw:text-style-name="P2" svg:width="8.4996in" svg:height="11.0142in" svg:x="0.0252in" svg:y="-0.5in"><text:p/><draw:enhanced-geometry svg:viewBox="0 0 21600 21600" draw:type="rectangle" draw:enhanced-path="M 0 0 L 21600 0 21600 21600 0 21600 0 0 Z N"/></draw:custom-shape></text:h>
      <text:p text:style-name="P3"><draw:custom-shape text:anchor-type="paragraph" draw:z-index="1" draw:name="Shape 14"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5"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1" text:outline-level="2"><draw:frame draw:style-name="fr1" draw:name="Image4 Copy 1" text:anchor-type="as-char" svg:width="4.7902in" svg:height="5in" draw:z-index="14"><draw:image xlink:href="Pictures/100000010000028D000002AAD5A1DB36.png" xlink:type="simple" xlink:show="embed" xlink:actuate="onLoad" draw:mime-type="image/png"/></draw:frame></text:h>
      <text:p text:style-name="P8"><text:span text:style-name="T5"/></text:p>
      <text:p text:style-name="P8"><text:span text:style-name="T5"/></text:p>
      <text:p text:style-name="P8"><draw:custom-shape text:anchor-type="paragraph" draw:z-index="6" draw:name="Shape 37" draw:style-name="gr4" draw:text-style-name="P6" svg:width="8.4996in" svg:height="0.3642in" svg:x="-0.4902in" svg:y="0.2134in"><text:p/><draw:enhanced-geometry svg:viewBox="0 0 21600 21600" draw:type="rectangle" draw:enhanced-path="M 0 0 L 21600 0 21600 21600 0 21600 0 0 Z N"/></draw:custom-shape><text:span text:style-name="T5"/></text:p>
      <text:p text:style-name="P9">Event Scenario Pack</text:p>
      <text:p text:style-name="P10">BATTLETECH: OUTWORLDS WASTES</text:p>
      <text:h text:style-name="P11" text:outline-level="1"><text:span text:style-name="T6"><text:line-break/></text:span><text:span text:style-name="T7">PRIDE MONTH 202</text:span><text:span text:style-name="T8">6</text:span></text:h>
      <text:p text:style-name="P12"/>
      <text:p text:style-name="P13">--------------------------- START TRANSMISSION ----------------------------</text:p>
      <text:p text:style-name="P14"><text:span text:style-name="T9"><text:line-break/></text:span><text:span text:style-name="T10">A </text:span><text:span text:style-name="T11">WORD OF BLAKE SPLINTER GROUP CALLING THEMSELVES 'RED CELL' HAS BEEN </text:span><text:span text:style-name="T12">PURCHASING SLAVE LABOR FROM MARIAN HEGEMONY MARKETS. THE LOTHIAN LEAGUE HAS ISSUED A BOUNTY ON </text:span><text:span text:style-name="T11">'</text:span><text:span text:style-name="T12">RED CELL</text:span><text:span text:style-name="T11">'</text:span><text:span text:style-name="T12"> FORCES PURCHASING SLAVES FROM MARIAN HEGEMONY MARKETS, SEEKING TO DETER THIS VIOLENT FACTION FROM GAINING A FOOTHOLD IN THEIR REGION. </text:span><text:span text:style-name="T13">A TRANSFER IS OCCURRING ON </text:span><text:span text:style-name="T14">BLANTLEFF.</text:span></text:p>
      <text:p text:style-name="P13"><text:line-break/>---------------------------- END TRANSMISSION -----------------------------</text:p>
      <text:p text:style-name="P15"/>
      <text:p text:style-name="P16">These are player-vs-GM scenarios <text:span text:style-name="T15">for </text:span><text:span text:style-name="T16">BattleTech: Outworlds Wastes </text:span>with combined arms and simplified campaign logistics rules.</text:p>
      <text:p text:style-name="P17"/>
      <text:p text:style-name="P18">Each player may <text:span text:style-name="T17">bring</text:span> <text:span text:style-name="T17">3,000 BV of combined arms </text:span><text:span text:style-name="T18">from a single faction in the ilClan era on the Master Unit List</text:span><text:span text:style-name="T17">, following the </text:span><text:span text:style-name="T19">BattleTech: Outworlds Wastes</text:span><text:span text:style-name="T17"> </text:span><text:span text:style-name="T20">event </text:span><text:span text:style-name="T17">list building rules. </text:span><text:span text:style-name="T21">Each force must have at least 1 '</text:span><text:span text:style-name="T22">M</text:span><text:span text:style-name="T21">ech, but it is recommended that each force </text:span><text:span text:style-name="T23">also has a vehicle with an infantry bay.</text:span></text:p>
      <text:p text:style-name="P17"/>
      <text:p text:style-name="P19">The following optional rules <text:span text:style-name="T24">are recommended</text:span>:</text:p>
      <text:p text:style-name="P19"><text:s text:c="2"/>- Initiative Deck: Initiative <text:span text:style-name="T25">is</text:span> determined by playing cards.</text:p>
      <text:p text:style-name="P19"><text:s text:c="6"/>Each player receives one card; their whole force activates together.</text:p>
      <text:p text:style-name="P19"><text:s text:c="6"/>The Movement Phase is resolved from lowest value to highest.</text:p>
      <text:p text:style-name="P19"><text:s text:c="6"/>The Attack Phases are resolved from highest value to lowest.</text:p>
      <text:p text:style-name="P19"><text:s text:c="2"/>- Fire for Effect: Attack declaration and resolution occur simultaneously.</text:p>
      <text:p text:style-name="P19"><text:s text:c="2"/>- <text:span text:style-name="T26">Multiple Attack Rolls: </text:span><text:span text:style-name="T24">S</text:span><text:span text:style-name="T27">eparate attack rolls</text:span><text:span text:style-name="T26"> for each point of damage. </text:span><text:span text:style-name="T27">(</text:span><text:span text:style-name="T26">Alpha Strike</text:span><text:span text:style-name="T24">)</text:span></text:p>
      <text:p text:style-name="P17"/>
      <text:p text:style-name="P16"><text:span text:style-name="T28">BattleTech Outworlds Wastes</text:span>:</text:p>
      <text:p text:style-name="P20"><text:span text:style-name="T29"><text:s text:c="2"/>Web: </text:span><text:a xlink:type="simple" xlink:href="https://outworlds-wastes.jeremylt.org/event-play" text:style-name="Internet_20_link" text:visited-style-name="Visited_20_Internet_20_Link"><text:span text:style-name="T30">https://outworlds-wastes.jeremylt.org/event-play</text:span></text:a></text:p>
      <text:p text:style-name="P21"><text:span text:style-name="T31"><text:s text:c="2"/></text:span><text:span text:style-name="T32">PDF: </text:span><text:a xlink:type="simple" xlink:href="https://outworlds-wastes.jeremylt.org/downloads" text:style-name="Internet_20_link" text:visited-style-name="Visited_20_Internet_20_Link"><text:span text:style-name="T33">https://outworlds-wastes.jeremylt.org/</text:span><text:span text:style-name="T34">download</text:span><text:span text:style-name="T35">s?event</text:span></text:a></text:p>
      <text:p text:style-name="P22"><text:span text:style-name="T36"/></text:p>
      <text:p text:style-name="P23"><text:span text:style-name="T37">BattleTech: Outworlds Wastes</text:span><text:span text:style-name="T36"> is fan-made and based upon the official BattleTech rules from Catalyst Game Labs. BattleTech </text:span><text:span text:style-name="T38">is a</text:span><text:span text:style-name="T36"> registered trademark of The Topps Company, Inc. in the United States and other countries.</text:span></text:p>
      <text:p text:style-name="P24"><text:span text:style-name="T36"/></text:p>
      <text:p text:style-name="P25"><text:span text:style-name="T36">Era: </text:span><text:span text:style-name="T39">Dark Age</text:span><text:span text:style-name="T36"> or later</text:span></text:p>
      <text:p text:style-name="P22"><text:span text:style-name="T36"/></text:p>
      <text:p text:style-name="P26"><text:span text:style-name="T36">E</text:span><text:span text:style-name="T35">ditor: Jeremy L Thompson</text:span></text:p>
      <text:p text:style-name="P27">--------------------------- START TRANSMISSION ----------------------------</text:p>
      <text:h text:style-name="P28" text:outline-level="1"><text:line-break/><text:span text:style-name="T40">MISSION BACKGROUND</text:span></text:h>
      <text:p text:style-name="P29"/>
      <text:p text:style-name="P30">'RED CELL' IS A VIOLENT SPLINTER GROUP FORMED FROM WORD OF BLAKE REMNANTS. THEY MANDATE STRICT ADHERENCE TO THEIR INTERPRETATION OF BLAKEIST IDEOLOGY AND RESTRICT LOCAL POPULATIONS THEY CONTROL.</text:p>
      <text:p text:style-name="P31"><text:span text:style-name="T11"/></text:p>
      <text:p text:style-name="P32"><text:span text:style-name="T41">BLANTLEFF</text:span><text:span text:style-name="T11"> IS A</text:span><text:span text:style-name="T42"> SYSTEM </text:span><text:span text:style-name="T43">IN THE </text:span><text:span text:style-name="T41">MARIAN HEGEMONY</text:span><text:span text:style-name="T43"> </text:span><text:span text:style-name="T41">NEAR THE FREE WORLDS LEAGUE</text:span><text:span text:style-name="T11">. </text:span><text:span text:style-name="T41">THE SYSTEM HAS TRADED HANDS BETWEEN THE LOTHIAN LEAGUE, CIRCINUS FEDERATION, AND MARIAN HEGEMONY SEVERAL TIMES OVER ITS HISTORY.</text:span></text:p>
      <text:p text:style-name="P32"><text:span text:style-name="T44"/></text:p>
      <text:p text:style-name="P33"><text:span text:style-name="T9">'RED CELL' FORCES </text:span><text:span text:style-name="T41">HAVE ARRIVED ON PLANET TO TAKE SLAVES FROM LOCAL MARIAN FORCES</text:span><text:span text:style-name="T9">. </text:span><text:span text:style-name="T41">YOUR MERCENARY FORCES HAVE ELECTED TO ATTACK THE </text:span><text:span text:style-name="T11">'</text:span><text:span text:style-name="T41">RED CELL</text:span><text:span text:style-name="T11">' </text:span><text:span text:style-name="T41">FORCES AS THEY MEET THE MARIAN SLAVERS AND FREE THE SLAVES.</text:span></text:p>
      <text:p text:style-name="P31"><text:span text:style-name="T11"/></text:p>
      <text:p text:style-name="P31"/>
      <text:h text:style-name="P34" text:outline-level="2"><text:line-break/><text:span text:style-name="T45">LOCAL AREA STAR MAP</text:span></text:h>
      <text:p text:style-name="P35"/>
      <text:p text:style-name="P36"><text:span text:style-name="T9"><draw:frame draw:style-name="fr2" draw:name="Image3" text:anchor-type="as-char" svg:width="7.5in" svg:height="8.5701in" draw:z-index="7"><draw:image xlink:href="Pictures/100000000000071A0000082020F49BA0.png" xlink:type="simple" xlink:show="embed" xlink:actuate="onLoad" draw:mime-type="image/png"/></draw:frame></text:span></text:p>
      <text:p text:style-name="P37"/>
      <text:p text:style-name="P37"/>
      <text:h text:style-name="P38" text:outline-level="2"><text:span text:style-name="T46">BLANTLEFF</text:span><text:span text:style-name="T47"> </text:span><text:span text:style-name="T22">I</text:span><text:span text:style-name="T17"> </text:span>PLANETARY READOUT</text:h>
      <text:p text:style-name="P39"/>
      <text:p text:style-name="P39"><text:span text:style-name="T47">STAR TYPE <text:s text:c="14"/>: </text:span><text:span text:style-name="T46">K9V</text:span><text:span text:style-name="T47"> (</text:span><text:span text:style-name="T46">200</text:span><text:span text:style-name="T47"> HOURS RECHARGE TIME)</text:span><text:line-break/><text:span text:style-name="T47">POSITION IN SYSTEM <text:s text:c="5"/>: </text:span><text:span text:style-name="T46">1</text:span><text:span text:style-name="T47"> OF </text:span><text:span text:style-name="T48">1</text:span><text:span text:style-name="T46">1</text:span></text:p>
      <text:p text:style-name="P40">NATURAL SATELLITES <text:s text:c="5"/>: <text:span text:style-name="T48">0</text:span></text:p>
      <text:p text:style-name="P40">TIME TO JUMP POINT <text:s text:c="5"/>: <text:span text:style-name="T46">3.32</text:span> DAYS</text:p>
      <text:p text:style-name="P40">SURFACE GRAVITY <text:s text:c="8"/>: <text:span text:style-name="T46">0.70</text:span> G</text:p>
      <text:p text:style-name="P41">DAY LENGTH <text:s text:c="13"/>: <text:span text:style-name="T46">19</text:span>.0 HOURS</text:p>
      <text:p text:style-name="P40">ATMOSPHERIC PRESSURE <text:s text:c="3"/>: <text:span text:style-name="T22">THIN</text:span> (BREATHABLE)</text:p>
      <text:p text:style-name="P40">EQUATORIAL TEMPERATURE <text:s/>: <text:span text:style-name="T22">2</text:span><text:span text:style-name="T46">9</text:span>*C</text:p>
      <text:p text:style-name="P40">SURFACE WATER <text:s text:c="10"/>: <text:span text:style-name="T46">38</text:span><text:span text:style-name="T48"> PERCENT</text:span></text:p>
      <text:p text:style-name="P42">CAPITAL <text:s text:c="16"/>: <text:span text:style-name="T46">NEW RED FISH</text:span></text:p>
      <text:p text:style-name="P39">POPULATION <text:s text:c="13"/>: <text:span text:style-name="T46">26,749,909</text:span></text:p>
      <text:p text:style-name="P40">HPG <text:s text:c="20"/>: <text:span text:style-name="T48">NONE</text:span></text:p>
      <text:p text:style-name="P42">SOCIO-INDUSTRIAL LEVELS : <text:span text:style-name="T46">F-D-C-D-D</text:span></text:p>
      <text:p text:style-name="P39"><text:s text:c="2"/><text:span text:style-name="T47">TECHNOLOGICAL SOPHISTICATION : </text:span><text:span text:style-name="T22">F</text:span><text:span text:style-name="T47"> (</text:span><text:span text:style-name="T22">PRIMITIVE WORLD</text:span><text:span text:style-name="T47">)</text:span></text:p>
      <text:p text:style-name="P43"><text:s text:c="2"/><text:span text:style-name="T47">INDUSTRIAL DEVELOPMENT <text:s text:c="6"/>: </text:span><text:span text:style-name="T22">D</text:span><text:span text:style-name="T47"> (</text:span><text:span text:style-name="T22">LOW INDUSTRIALIZATION</text:span><text:span text:style-name="T47">)</text:span></text:p>
      <text:p text:style-name="P43"><text:s text:c="2"/><text:span text:style-name="T47">RAW MATERIAL DEPENDENCE <text:s text:c="5"/>: </text:span><text:span text:style-name="T46">C</text:span><text:span text:style-name="T47"> (</text:span><text:span text:style-name="T46">SELF SUSTAINING</text:span><text:span text:style-name="T47">)</text:span></text:p>
      <text:p text:style-name="P43"><text:s text:c="2"/><text:span text:style-name="T47">INDUSTRIAL OUTPUT <text:s text:c="11"/>: </text:span><text:span text:style-name="T22">D</text:span><text:span text:style-name="T47"> (</text:span><text:span text:style-name="T22">NEGLIGIBLE INDUSTRY</text:span><text:span text:style-name="T47">)</text:span></text:p>
      <text:p text:style-name="P32"><text:span text:style-name="T9"><text:s text:c="2"/></text:span><text:span text:style-name="T49">AGRICULTURAL DEPENDENCE <text:s text:c="5"/>: </text:span><text:span text:style-name="T50">D</text:span><text:span text:style-name="T49"> (</text:span><text:span text:style-name="T50">POOR AGRICULTURE</text:span><text:span text:style-name="T49">)</text:span></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44"><text:span text:style-name="T49"/></text:p>
      <text:p text:style-name="P45">----------------------------- END TRANSMISSION ----------------------------</text:p>
      <text:h text:style-name="P46" text:outline-level="1">UNCHAINED</text:h>
      <text:p text:style-name="P47"/>
      <text:p text:style-name="P47">---------------------------- START TRANSMISSION ---------------------------</text:p>
      <text:p text:style-name="P48"><text:span text:style-name="T51"><text:line-break/></text:span><text:span text:style-name="T52">'</text:span><text:span text:style-name="T53">RED CELL</text:span><text:span text:style-name="T52">' </text:span><text:span text:style-name="T54">FORCES ARE MOVING TO COLLECT SLAVES FROM MARIAN FORCES </text:span><text:span text:style-name="T55">ON BLANTLEFF</text:span><text:span text:style-name="T53">. </text:span><text:span text:style-name="T54">INTERCEPT AND DESTROY THE </text:span><text:span text:style-name="T52">'</text:span><text:span text:style-name="T53">RED CELL</text:span><text:span text:style-name="T52">' </text:span><text:span text:style-name="T54">FORCES AND FREE THE SLAVES. ANY COLLATERAL DAMAGE TO MARIAN FORCES IS ACCEPTABLE.</text:span></text:p>
      <text:p text:style-name="P47"><text:span text:style-name="T51"><text:line-break/></text:span>----------------------------- END TRANSMISSION ----------------------------</text:p>
      <text:p text:style-name="P49"/>
      <text:p text:style-name="P50">Unit <text:span text:style-name="T56">Limits</text:span>: <text:span text:style-name="T22">3</text:span><text:span text:style-name="T53">K BV for each </text:span><text:span text:style-name="T22">player force</text:span><text:span text:style-name="T53"> and a corresponding </text:span><text:span text:style-name="T54">1.5</text:span><text:span text:style-name="T53">K BV </text:span><text:span text:style-name="T54">each </text:span><text:span text:style-name="T53">of </text:span><text:span text:style-name="T54">Red Cell and Marian</text:span><text:span text:style-name="T53"> forces.</text:span></text:p>
      <text:p text:style-name="P51"/>
      <text:p text:style-name="P50">Map: <text:span text:style-name="T53">One central mapsheet with a large base and 8 adjoining mapsheets</text:span><text:span text:style-name="T57"> with </text:span><text:span text:style-name="T54">grasslands or forest</text:span> terrain. <text:span text:style-name="T54">Marian forces start inside of the base along with 4 markers for each player indicating the location of slaves. </text:span><text:span text:style-name="T58">Multiple markers may be placed in the same hex if necessary.</text:span><text:span text:style-name="T54"> All Red Cell forces start on the outer edge of one of the mapsheets immediately adjacent to the center mapsheet (immediately north, south, east, or west, but not the corner mapsheets).</text:span></text:p>
      <text:p text:style-name="P51"/>
      <text:p text:style-name="P52"><draw:line text:anchor-type="paragraph" draw:z-index="9" draw:name="Horizontal line 7" draw:style-name="gr5" draw:text-style-name="P53" svg:x1="3.2882in" svg:y1="0.0161in" svg:x2="3.2846in" svg:y2="2.0752in"><text:p/></draw:line><draw:line text:anchor-type="paragraph" draw:z-index="10" draw:name="Horizontal line 8" draw:style-name="gr5" draw:text-style-name="P53" svg:x1="2.3299in" svg:y1="1.4236in" svg:x2="5.1898in" svg:y2="1.4236in"><text:p/></draw:line><draw:line text:anchor-type="paragraph" draw:z-index="12" draw:name="Horizontal line 1" draw:style-name="gr5" draw:text-style-name="P53" svg:x1="2.3299in" svg:y1="0.6362in" svg:x2="5.1898in" svg:y2="0.6362in"><text:p/></draw:line><draw:line text:anchor-type="paragraph" draw:z-index="13" draw:name="Horizontal line 2" draw:style-name="gr5" draw:text-style-name="P53" svg:x1="4.3382in" svg:y1="0.0161in" svg:x2="4.3346in" svg:y2="2.0752in"><text:p/></draw:line><draw:custom-shape text:anchor-type="char" draw:z-index="11" draw:name="Shape 40" draw:style-name="gr6" draw:text-style-name="P54" svg:width="0.3004in" svg:height="0.3004in" svg:x="3.6346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38" draw:style-name="gr7" draw:text-style-name="P55" svg:width="2.8504in" svg:height="2.0587in"><text:p/><draw:enhanced-geometry svg:viewBox="0 0 21600 21600" draw:type="rectangle" draw:enhanced-path="M 0 0 L 21600 0 21600 21600 0 21600 0 0 Z N"/></draw:custom-shape></text:p>
      <text:p text:style-name="P51"/>
      <text:p text:style-name="P56"><text:span text:style-name="T59">Primary Objective: </text:span><text:span text:style-name="T54">Destroy all Red Cell units.</text:span><text:span text:style-name="T60"> </text:span><text:span text:style-name="T61">Earn a portion of 3M C-bills based upon the percent</text:span><text:span text:style-name="T62">age</text:span><text:span text:style-name="T61"> of </text:span><text:span text:style-name="T58">Red Cell</text:span><text:span text:style-name="T61"> </text:span><text:span text:style-name="T62">units</text:span><text:span text:style-name="T60"> </text:span><text:span text:style-name="T61">destroyed.</text:span></text:p>
      <text:p text:style-name="P57"/>
      <text:p text:style-name="P58">Secondary Objectives:</text:p>
      <text:p text:style-name="P59">Break chains<text:span text:style-name="T63">. </text:span>Enter any hex <text:span text:style-name="T64">(</text:span>be within <text:span text:style-name="T64">2") </text:span>containing a marker indicating the location of slaves with a unit equipped with an infantry bay. If the hex is not contested (no enemy units within <text:span text:style-name="T64">2"</text:span>) during the End Phase, then you may load the slaves into the infantry bay of your unit<text:span text:style-name="T64">. </text:span><text:span text:style-name="T65">Remove the marker from the board.</text:span><text:span text:style-name="T64"> </text:span><text:span text:style-name="T55">If you are in an uncontested hex on the edge of the map (no enemy units within </text:span><text:span text:style-name="T64">2"</text:span>) <text:span text:style-name="T66">during the End Phase of a subsequent turn</text:span>, <text:span text:style-name="T55">then </text:span>you may free these slaves by unloading <text:span text:style-name="T66">them</text:span><text:span text:style-name="T55">.</text:span><text:span text:style-name="T64"> </text:span><text:span text:style-name="T67">A unit may only carry one group of slaves per infantry bay at a time. </text:span><text:span text:style-name="T68">If the carrying unit is destroyed, </text:span><text:span text:style-name="T69">then </text:span><text:span text:style-name="T68">the group perishes. </text:span><text:span text:style-name="T64">Earn 500,000 C-bills for each </text:span>group of slaves freed<text:span text:style-name="T64">, up to 2M C-bills.</text:span></text:p>
      <text:p text:style-name="P60">--------------------------- START TRANSMISSION ----------------------------</text:p>
      <text:p text:style-name="P61"/>
      <text:h text:style-name="P62" text:outline-level="1">MISSION BOUNTIES</text:h>
      <text:p text:style-name="P63"/>
      <text:p text:style-name="P63">THE FOLLOWING BOUNTIES HAVE BEEN ISSUED FOR THIS MISSION.</text:p>
      <text:p text:style-name="P63"/>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4">PAYMENT</text:p>
          </table:table-cell>
          <table:table-cell table:style-name="CastleBrianRAT.B1" office:value-type="string">
            <text:p text:style-name="P65">ACTIVITY</text:p>
          </table:table-cell>
        </table:table-row>
        <table:table-row>
          <table:table-cell table:style-name="CastleBrianRAT.A2" office:value-type="string">
            <text:p text:style-name="P66">100,000</text:p>
          </table:table-cell>
          <table:table-cell table:style-name="CastleBrianRAT.B2" office:value-type="string">
            <text:p text:style-name="P67">DAMAGE ENEMY UNIT (PER UNIT)</text:p>
          </table:table-cell>
        </table:table-row>
        <table:table-row>
          <table:table-cell table:style-name="CastleBrianRAT.A2" office:value-type="string">
            <text:p text:style-name="P66">100,000</text:p>
          </table:table-cell>
          <table:table-cell table:style-name="CastleBrianRAT.B2" office:value-type="string">
            <text:p text:style-name="P67">CRITICAL OR MOTIVE DAMAGE (PER UNIT)</text:p>
          </table:table-cell>
        </table:table-row>
        <table:table-row>
          <table:table-cell table:style-name="CastleBrianRAT.A2" office:value-type="string">
            <text:p text:style-name="P66">100,000</text:p>
          </table:table-cell>
          <table:table-cell table:style-name="CastleBrianRAT.B2" office:value-type="string">
            <text:p text:style-name="P67">COMPLETE A PHYSICAL ATTACK</text:p>
          </table:table-cell>
        </table:table-row>
        <table:table-row>
          <table:table-cell table:style-name="CastleBrianRAT.A2" office:value-type="string">
            <text:p text:style-name="P66">100,000</text:p>
          </table:table-cell>
          <table:table-cell table:style-name="CastleBrianRAT.B2" office:value-type="string">
            <text:p text:style-name="P67">COMPLETE AN ANTI-MECH ATTACK</text:p>
          </table:table-cell>
        </table:table-row>
        <table:table-row>
          <table:table-cell table:style-name="CastleBrianRAT.A2" office:value-type="string">
            <text:p text:style-name="P66">100,000</text:p>
          </table:table-cell>
          <table:table-cell table:style-name="CastleBrianRAT.B2" office:value-type="string">
            <text:p text:style-name="P67">DAMAGE A UNIT WITH INDIRECT FIRE</text:p>
          </table:table-cell>
        </table:table-row>
        <table:table-row>
          <table:table-cell table:style-name="CastleBrianRAT.A2" office:value-type="string">
            <text:p text:style-name="P66">100,000</text:p>
          </table:table-cell>
          <table:table-cell table:style-name="CastleBrianRAT.B2" office:value-type="string">
            <text:p text:style-name="P67">SKID A UNIT WITHOUT DESTROYING IT</text:p>
          </table:table-cell>
        </table:table-row>
        <table:table-row>
          <table:table-cell table:style-name="CastleBrianRAT.A2" office:value-type="string">
            <text:p text:style-name="P68">100,000</text:p>
          </table:table-cell>
          <table:table-cell table:style-name="CastleBrianRAT.B2" office:value-type="string">
            <text:p text:style-name="P69">DESTROY ENEMY UNIT (PER UNIT)</text:p>
          </table:table-cell>
        </table:table-row>
        <table:table-row>
          <table:table-cell table:style-name="CastleBrianRAT.A2" office:value-type="string">
            <text:p text:style-name="P66">250,000</text:p>
          </table:table-cell>
          <table:table-cell table:style-name="CastleBrianRAT.B2" office:value-type="string">
            <text:p text:style-name="P67">KNOCK 'MECH PILOT UNCONSCIOUS</text:p>
          </table:table-cell>
        </table:table-row>
        <table:table-row>
          <table:table-cell table:style-name="CastleBrianRAT.A2" office:value-type="string">
            <text:p text:style-name="P66">250,000</text:p>
          </table:table-cell>
          <table:table-cell table:style-name="CastleBrianRAT.B2" office:value-type="string">
            <text:p text:style-name="P67">REDUCE <text:span text:style-name="T70">A </text:span>COMBAT VEHICLE TO 0 MP</text:p>
          </table:table-cell>
        </table:table-row>
        <table:table-row>
          <table:table-cell table:style-name="CastleBrianRAT.A2" office:value-type="string">
            <text:p text:style-name="P66">250,000</text:p>
          </table:table-cell>
          <table:table-cell table:style-name="CastleBrianRAT.B2" office:value-type="string">
            <text:p text:style-name="P67">KILL ALL BUT 1 TROOP IN AN INFANTRY UNIT</text:p>
          </table:table-cell>
        </table:table-row>
        <table:table-row>
          <table:table-cell table:style-name="CastleBrianRAT.A2" office:value-type="string">
            <text:p text:style-name="P66">250,000</text:p>
          </table:table-cell>
          <table:table-cell table:style-name="CastleBrianRAT.B2" office:value-type="string">
            <text:p text:style-name="P67">HAVE A UNIT SCORE A HIT AT ALL 3 RANGES</text:p>
          </table:table-cell>
        </table:table-row>
        <table:table-row>
          <table:table-cell table:style-name="CastleBrianRAT.A2" office:value-type="string">
            <text:p text:style-name="P66">250,000</text:p>
          </table:table-cell>
          <table:table-cell table:style-name="CastleBrianRAT.B2" office:value-type="string">
            <text:p text:style-name="P67">COMPLETE A CHARGE ATTACK</text:p>
          </table:table-cell>
        </table:table-row>
        <table:table-row>
          <table:table-cell table:style-name="CastleBrianRAT.A2" office:value-type="string">
            <text:p text:style-name="P66">250,000</text:p>
          </table:table-cell>
          <table:table-cell table:style-name="CastleBrianRAT.B2" office:value-type="string">
            <text:p text:style-name="P67">COMPLETE A DEATH FROM ABOVE <text:span text:style-name="T70">ATTACK</text:span></text:p>
          </table:table-cell>
        </table:table-row>
        <table:table-row>
          <table:table-cell table:style-name="CastleBrianRAT.A2" office:value-type="string">
            <text:p text:style-name="P66">500,000</text:p>
          </table:table-cell>
          <table:table-cell table:style-name="CastleBrianRAT.B2" office:value-type="string">
            <text:p text:style-name="P67">SHOOT DOWN A VTOL WITH A TMM OF 5+</text:p>
          </table:table-cell>
        </table:table-row>
        <table:table-row>
          <table:table-cell table:style-name="CastleBrianRAT.A2" office:value-type="string">
            <text:p text:style-name="P66">500,000</text:p>
          </table:table-cell>
          <table:table-cell table:style-name="CastleBrianRAT.B2" office:value-type="string">
            <text:p text:style-name="P67"><text:span text:style-name="T70">SHOOT</text:span> A 'MECH IN THE HEAD</text:p>
          </table:table-cell>
        </table:table-row>
        <table:table-row>
          <table:table-cell table:style-name="CastleBrianRAT.A2" office:value-type="string">
            <text:p text:style-name="P66">500,000</text:p>
          </table:table-cell>
          <table:table-cell table:style-name="CastleBrianRAT.B2" office:value-type="string">
            <text:p text:style-name="P67"><text:span text:style-name="T70">PHYSICAL ATTACK</text:span> A 'MECH <text:span text:style-name="T71">IN THE HEAD</text:span></text:p>
          </table:table-cell>
        </table:table-row>
        <table:table-row table:style-name="CastleBrianRAT.18">
          <table:table-cell table:style-name="CastleBrianRAT.A18" office:value-type="string">
            <text:p text:style-name="P66">500,000</text:p>
          </table:table-cell>
          <table:table-cell table:style-name="CastleBrianRAT.B18" office:value-type="string">
            <text:p text:style-name="P67">CAPTURE A VEHICLE CREW OR 'MECH PILOT</text:p>
          </table:table-cell>
        </table:table-row>
      </table:table>
      <text:p text:style-name="P7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1"/>
      <text:p text:style-name="P61">---------------------------- END TRANSMISSION -----------------------------</text:p>
      <text:p text:style-name="P10">BATTLETECH: OUTWORLDS WASTES</text:p>
      <text:h text:style-name="P72" text:outline-level="1"><text:span text:style-name="T6"><text:line-break/></text:span><text:span text:style-name="T53">PRIDE MONTH 202</text:span><text:span text:style-name="T55">6</text:span><text:span text:style-name="T72"> - </text:span>GM Notes</text:h>
      <text:p text:style-name="P73"/>
      <text:p text:style-name="P73"/>
      <text:h text:style-name="P74" text:outline-level="2">Note<text:span text:style-name="T73">s</text:span>:</text:h>
      <text:p text:style-name="P75"><text:span text:style-name="T74">GM forces </text:span><text:span text:style-name="T75">should consist of Word of Blake ‘mechs and vehicles with infantry bays for Red Cell and Marian Hegemony ‘mechs designed for anti-infantry attacks. The Marian Hegemony force should include at least one Centurion.</text:span></text:p>
      <text:p text:style-name="P76"/>
      <text:p text:style-name="P77">The mission bounties assume a <text:span text:style-name="T73">c</text:span>ombined arms force for the defenders, but the bounties</text:p>
      <text:p text:style-name="P77"><text:s text:c="2"/>may be adjusted to reflect the personal preferences of the GM and the players.</text:p>
      <text:p text:style-name="P78"><text:s text:c="2"/>PesudoTech is a good place to look for additional bounties to add to the scenario.</text:p>
      <text:p text:style-name="P76"/>
      <text:p text:style-name="P79">This scenario is intended to be inclusive of all players. It is important to ensure a friendly</text:p>
      <text:p text:style-name="P79"><text:s text:c="2"/>and welcoming environment for this event.</text:p>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custom-shape text:anchor-type="paragraph" draw:z-index="3" draw:name="Shape 18" draw:style-name="gr8" draw:text-style-name="P82" svg:width="8.4996in" svg:height="11.0142in" svg:x="-1.0252in" svg:y="-0.1063in"><text:p/><draw:enhanced-geometry svg:viewBox="0 0 21600 21600" draw:type="rectangle" draw:enhanced-path="M 0 0 L 21600 0 21600 21600 0 21600 0 0 Z N"/></draw:custom-shape></text:p>
      <text:p text:style-name="P83"><draw:custom-shape text:anchor-type="paragraph" draw:z-index="4" draw:name="Shape 17" draw:style-name="gr9"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10" draw:text-style-name="P6" svg:width="8.4996in" svg:height="0.7398in" svg:x="-0.7244in" svg:y="0.8764in"><text:p/><draw:enhanced-geometry svg:viewBox="0 0 21600 21600" draw:type="rectangle" draw:enhanced-path="M 0 0 L 21600 0 21600 21600 0 21600 0 0 Z N"/></draw:custom-shape><text:span text:style-name="T76">B</text:span><text:span text:style-name="T77">A</text:span><text:span text:style-name="T78">TTLE</text:span><text:span text:style-name="T76">T</text:span><text:span text:style-name="T78">ECH</text:span><text:span text:style-name="T79"><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_20_2" draw:display-name="Gradient 2" draw:style="linear" draw:start-color="#ccc5b3" draw:end-color="#ccc5b3" draw:start-intensity="100%" draw:end-intensity="100%" draw:angle="45deg" draw:border="20%">
      <loext:gradient-stop svg:offset="0" loext:color-type="rgb" loext:color-value="#ccc5b3"/>
      <loext:gradient-stop svg:offset="0" loext:color-type="rgb" loext:color-value="#ff0000"/>
      <loext:gradient-stop svg:offset="0.25" loext:color-type="rgb" loext:color-value="#ffff00"/>
      <loext:gradient-stop svg:offset="0.375" loext:color-type="rgb" loext:color-value="#00ff00"/>
      <loext:gradient-stop svg:offset="0.5625" loext:color-type="rgb" loext:color-value="#00ffff"/>
      <loext:gradient-stop svg:offset="0.75" loext:color-type="rgb" loext:color-value="#ff00ff"/>
      <loext:gradient-stop svg:offset="0.75" loext:color-type="rgb" loext:color-value="#ccc5b3"/>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2-16T14:50:50.577175863</meta:creation-date>
    <dc:date>2026-06-03T13:45:09.305914652</dc:date>
    <meta:editing-duration>P1DT2H8M36S</meta:editing-duration>
    <meta:editing-cycles>187</meta:editing-cycles>
    <meta:generator>LibreOffice/25.8.7.3$Linux_X86_64 LibreOffice_project/580$Build-3</meta:generator>
    <meta:print-date>2024-06-12T08:34:01.287617660</meta:print-date>
    <meta:printed-by>PDF files</meta:printed-by>
    <meta:document-statistic meta:table-count="1" meta:image-count="2" meta:object-count="0" meta:page-count="9" meta:paragraph-count="110" meta:word-count="1024" meta:character-count="6812" meta:non-whitespace-character-count="5703"/>
  </office:meta>
</office:document-meta>
</file>